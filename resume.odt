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Standard">
      <style:table-properties style:width="7.5in" fo:margin-top="0in" fo:margin-bottom="0in" style:page-number="2" table:align="margins" style:writing-mode="page"/>
    </style:style>
    <style:style style:name="Table1.A" style:family="table-column">
      <style:table-column-properties style:column-width="1.8958in" style:rel-column-width="16565*"/>
    </style:style>
    <style:style style:name="Table1.B" style:family="table-column">
      <style:table-column-properties style:column-width="3.9896in" style:rel-column-width="34860*"/>
    </style:style>
    <style:style style:name="Table1.C" style:family="table-column">
      <style:table-column-properties style:column-width="1.6146in" style:rel-column-width="14110*"/>
    </style:style>
    <style:style style:name="Table1.1" style:family="table-row">
      <style:table-row-properties style:min-row-height="0.5729in" fo:keep-together="auto"/>
    </style:style>
    <style:style style:name="Table1.A1" style:family="table-cell">
      <style:table-cell-properties fo:background-color="transparent" fo:padding="0.0694in" fo:border="none">
        <style:background-image/>
      </style:table-cell-properties>
    </style:style>
    <style:style style:name="P1" style:family="paragraph" style:parent-style-name="Heading_20_2">
      <style:text-properties style:font-name="Calibri1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3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4" style:family="paragraph" style:parent-style-name="Heading_20_2">
      <style:text-properties fo:color="#800000" loext:opacity="100%" style:font-name="Calibri" style:font-name-complex="Calibri2"/>
    </style:style>
    <style:style style:name="P5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P6" style:family="paragraph" style:parent-style-name="Standard">
      <style:paragraph-properties fo:margin-left="0.5in" fo:text-align="justify" style:justify-single-word="false" fo:padding="0in" fo:border="none" style:shadow="none" style:join-border="false">
        <style:tab-stops>
          <style:tab-stop style:position="0.2957in"/>
          <style:tab-stop style:position="0.4925in"/>
          <style:tab-stop style:position="0.5in"/>
          <style:tab-stop style:position="1.5in"/>
        </style:tab-stops>
      </style:paragraph-properties>
      <style:text-properties fo:color="#000000" loext:opacity="100%" style:font-name="Calibri" fo:background-color="#ffffff" style:font-name-complex="Calibri2"/>
    </style:style>
    <style:style style:name="P7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rsid="0018d397" officeooo:paragraph-rsid="0018d397"/>
    </style:style>
    <style:style style:name="P9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10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officeooo:paragraph-rsid="0028b1a9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3ce90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4f626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6c346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76094"/>
    </style:style>
    <style:style style:name="P16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" fo:font-size="11pt" style:font-size-asian="11pt" style:font-name-complex="Calibri2" style:font-size-complex="11pt"/>
    </style:style>
    <style:style style:name="P17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8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19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4f626"/>
    </style:style>
    <style:style style:name="P20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fo:font-size="11pt" officeooo:paragraph-rsid="0026c346" style:font-size-asian="11pt" style:font-size-complex="11pt"/>
    </style:style>
    <style:style style:name="P21" style:family="paragraph" style:parent-style-name="Standard" style:list-style-name="WWNum1">
      <style:text-properties style:font-name="Calibri1" fo:font-size="11pt" style:font-size-asian="11pt" style:font-size-complex="11pt"/>
    </style:style>
    <style:style style:name="P22" style:family="paragraph" style:parent-style-name="Standard" style:list-style-name="WWNum1">
      <style:text-properties style:font-name="Calibri1" fo:font-size="11pt" officeooo:rsid="00276094" officeooo:paragraph-rsid="00276094" style:font-size-asian="11pt" style:font-size-complex="11pt"/>
    </style:style>
    <style:style style:name="P23" style:family="paragraph" style:parent-style-name="Standard">
      <style:text-properties officeooo:paragraph-rsid="00216dfa"/>
    </style:style>
    <style:style style:name="P24" style:family="paragraph" style:parent-style-name="Standard">
      <style:text-properties officeooo:paragraph-rsid="00276094"/>
    </style:style>
    <style:style style:name="P25" style:family="paragraph" style:parent-style-name="Standard">
      <style:paragraph-properties style:vertical-align="baseline"/>
    </style:style>
    <style:style style:name="P26" style:family="paragraph" style:parent-style-name="Standard">
      <style:paragraph-properties style:vertical-align="baseline"/>
      <style:text-properties officeooo:paragraph-rsid="001f20d6"/>
    </style:style>
    <style:style style:name="P27" style:family="paragraph" style:parent-style-name="Standard">
      <style:paragraph-properties style:vertical-align="baseline"/>
      <style:text-properties officeooo:paragraph-rsid="002fe00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background-color="#ffffff" loext:char-shading-value="0" style:font-name-complex="Calibri2"/>
    </style:style>
    <style:style style:name="T3" style:family="text">
      <style:text-properties fo:color="#000000" loext:opacity="100%" style:font-name="Calibri" officeooo:rsid="0018d397" style:font-name-complex="Calibri2"/>
    </style:style>
    <style:style style:name="T4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5" style:family="text">
      <style:text-properties fo:color="#000000" loext:opacity="100%" style:font-name="Calibri" fo:font-size="11pt" officeooo:rsid="001f20d6" style:font-size-asian="11pt" style:font-name-complex="Calibri2" style:font-size-complex="11pt"/>
    </style:style>
    <style:style style:name="T6" style:family="text">
      <style:text-properties fo:color="#000000" loext:opacity="100%" style:font-name="Calibri" fo:font-size="11pt" officeooo:rsid="0020784a" style:font-size-asian="11pt" style:font-name-complex="Calibri2" style:font-size-complex="11pt"/>
    </style:style>
    <style:style style:name="T7" style:family="text">
      <style:text-properties fo:color="#000000" loext:opacity="100%" style:font-name="Calibri" fo:font-size="11pt" officeooo:rsid="002fe005" style:font-size-asian="11pt" style:font-name-complex="Calibri2" style:font-size-complex="11pt"/>
    </style:style>
    <style:style style:name="T8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fo:color="#000000" loext:opacity="100%" style:font-name="Calibri" fo:font-size="11pt" fo:font-weight="bold" officeooo:rsid="001f20d6" style:font-size-asian="11pt" style:font-weight-asian="bold" style:font-name-complex="Calibri2" style:font-size-complex="11pt" style:font-weight-complex="bold"/>
    </style:style>
    <style:style style:name="T10" style:family="text">
      <style:text-properties fo:color="#000000" loext:opacity="100%" style:font-name="Calibri" fo:font-size="11pt" fo:font-weight="bold" officeooo:rsid="002fe005" style:font-size-asian="11pt" style:font-weight-asian="bold" style:font-name-complex="Calibri2" style:font-size-complex="11pt" style:font-weight-complex="bold"/>
    </style:style>
    <style:style style:name="T11" style:family="text">
      <style:text-properties style:font-name="Calibri" style:font-name-complex="Calibri2"/>
    </style:style>
    <style:style style:name="T12" style:family="text">
      <style:text-properties style:font-name="Calibri" officeooo:rsid="0018d397" style:font-name-complex="Calibri2"/>
    </style:style>
    <style:style style:name="T13" style:family="text">
      <style:text-properties style:font-name="Calibri" fo:font-size="24pt" style:font-size-asian="24pt" style:font-name-complex="Calibri2" style:font-size-complex="24pt"/>
    </style:style>
    <style:style style:name="T14" style:family="text">
      <style:text-properties style:font-name="Calibri" fo:font-size="11pt" style:font-size-asian="11pt" style:font-name-complex="Calibri2" style:font-size-complex="11pt"/>
    </style:style>
    <style:style style:name="T15" style:family="text">
      <style:text-properties style:font-name="Calibri" fo:font-size="11pt" officeooo:rsid="001a1c55" style:font-size-asian="11pt" style:font-name-complex="Calibri2" style:font-size-complex="11pt"/>
    </style:style>
    <style:style style:name="T16" style:family="text">
      <style:text-properties style:font-name="Calibri" fo:font-size="11pt" officeooo:rsid="00216dfa" style:font-size-asian="11pt" style:font-name-complex="Calibri2" style:font-size-complex="11pt"/>
    </style:style>
    <style:style style:name="T17" style:family="text">
      <style:text-properties style:font-name="Calibri" fo:font-size="11pt" officeooo:rsid="0023ce90" style:font-size-asian="11pt" style:font-name-complex="Calibri2" style:font-size-complex="11pt"/>
    </style:style>
    <style:style style:name="T18" style:family="text">
      <style:text-properties style:font-name="Calibri" fo:font-size="11pt" officeooo:rsid="00276094" style:font-size-asian="11pt" style:font-name-complex="Calibri2" style:font-size-complex="11pt"/>
    </style:style>
    <style:style style:name="T19" style:family="text">
      <style:text-properties style:font-name="Calibri" fo:font-size="11pt" fo:font-weight="bold" style:font-size-asian="11pt" style:font-weight-asian="bold" style:font-name-complex="Calibri2" style:font-size-complex="11pt"/>
    </style:style>
    <style:style style:name="T20" style:family="text">
      <style:text-properties style:font-name="Calibri" fo:font-size="11pt" fo:font-weight="bold" officeooo:rsid="001a1c55" style:font-size-asian="11pt" style:font-weight-asian="bold" style:font-name-complex="Calibri2" style:font-size-complex="11pt"/>
    </style:style>
    <style:style style:name="T21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" fo:font-size="11pt" fo:font-weight="bold" officeooo:rsid="001a1c55" style:font-size-asian="11pt" style:font-weight-asian="bold" style:font-name-complex="Calibri2" style:font-size-complex="11pt" style:font-weight-complex="bold"/>
    </style:style>
    <style:style style:name="T23" style:family="text">
      <style:text-properties style:font-name="Calibri" fo:font-size="11pt" fo:font-weight="bold" officeooo:rsid="0023ce90" style:font-size-asian="11pt" style:font-weight-asian="bold" style:font-name-complex="Calibri2" style:font-size-complex="11pt" style:font-weight-complex="bold"/>
    </style:style>
    <style:style style:name="T24" style:family="text">
      <style:text-properties style:font-name="Calibri" fo:font-size="11pt" fo:font-weight="bold" officeooo:rsid="00276094" style:font-size-asian="11pt" style:font-weight-asian="bold" style:font-name-complex="Calibri2" style:font-size-complex="11pt" style:font-weight-complex="bold"/>
    </style:style>
    <style:style style:name="T25" style:family="text">
      <style:text-properties style:font-name="Calibri" fo:font-weight="bold" style:font-weight-asian="bold" style:font-name-complex="Calibri2"/>
    </style:style>
    <style:style style:name="T26" style:family="text">
      <style:text-properties style:font-name="Calibri" fo:font-weight="bold" officeooo:rsid="00216dfa" style:font-weight-asian="bold" style:font-name-complex="Calibri2"/>
    </style:style>
    <style:style style:name="T27" style:family="text">
      <style:text-properties style:font-name="Calibri" fo:font-weight="bold" officeooo:rsid="0024f626" style:font-weight-asian="bold" style:font-name-complex="Calibri2"/>
    </style:style>
    <style:style style:name="T28" style:family="text">
      <style:text-properties style:font-name="Calibri" fo:font-weight="bold" officeooo:rsid="0026c346" style:font-weight-asian="bold" style:font-name-complex="Calibri2"/>
    </style:style>
    <style:style style:name="T29" style:family="text">
      <style:text-properties style:font-name="Calibri" fo:font-weight="bold" officeooo:rsid="00276094" style:font-weight-asian="bold" style:font-name-complex="Calibri2"/>
    </style:style>
    <style:style style:name="T30" style:family="text">
      <style:text-properties style:font-name="Helvetica" fo:font-size="11pt" officeooo:rsid="0018d397" style:font-size-asian="11pt" style:font-name-complex="Calibri2" style:font-size-complex="11pt"/>
    </style:style>
    <style:style style:name="T31" style:family="text">
      <style:text-properties style:font-name="Helvetica" fo:font-size="11pt" officeooo:rsid="00196b82" style:font-size-asian="11pt" style:font-name-complex="Calibri2" style:font-size-complex="11pt"/>
    </style:style>
    <style:style style:name="T32" style:family="text">
      <style:text-properties style:font-name="Helvetica" fo:font-size="11pt" officeooo:rsid="00216dfa" style:font-size-asian="11pt" style:font-name-complex="Calibri2" style:font-size-complex="11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24f626" style:font-size-asian="11pt" style:font-size-complex="11pt"/>
    </style:style>
    <style:style style:name="T35" style:family="text">
      <style:text-properties officeooo:rsid="0024f626"/>
    </style:style>
    <style:style style:name="T36" style:family="text">
      <style:text-properties officeooo:rsid="00301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11"><text:span text:style-name="T12">Software Engineer</text:span></text:p>
          </table:table-cell>
          <table:table-cell table:style-name="Table1.A1" office:value-type="string">
            <text:p text:style-name="P8" loext:marker-style-name="T11"><text:span text:style-name="T13">Olaolu Emmanuel</text:span></text:p>
          </table:table-cell>
          <table:table-cell table:style-name="Table1.A1" office:value-type="string">
            <text:p text:style-name="P3"><text:a xlink:type="simple" xlink:href="https://bigo.lu/" text:style-name="Internet_20_link" text:visited-style-name="Visited_20_Internet_20_Link"><text:span text:style-name="T3">bigo.lu</text:span></text:a></text:p>
            <text:p text:style-name="P3" loext:marker-style-name="T11"><text:span text:style-name="T12">code</text:span><text:span text:style-name="T11">@</text:span><text:span text:style-name="T12">bigo.lu</text:span></text:p>
          </table:table-cell>
        </table:table-row>
      </table:table>
      <text:h text:style-name="P4" text:outline-level="2">Education</text:h>
      <text:p text:style-name="P10" loext:marker-style-name="T14"><text:span text:style-name="T19">B.</text:span><text:span text:style-name="T20">A</text:span><text:span text:style-name="T19">. Computer Science</text:span><text:span text:style-name="T14"> <text:s text:c="30"/></text:span><text:span text:style-name="T22">Rutgers University</text:span><text:span text:style-name="T14"> <text:tab/> <text:s text:c="55"/></text:span><text:span text:style-name="T19">201</text:span><text:span text:style-name="T20">4</text:span><text:span text:style-name="T19"> – 201</text:span><text:span text:style-name="T20">8 <text:s/></text:span></text:p>
      <text:h text:style-name="P1" text:outline-level="2"><text:bookmark text:name="_n1g13qb16uwf"/>Work Experience</text:h>
      <text:p text:style-name="P11" loext:marker-style-name="T25"><text:span text:style-name="T26">Mid-Level</text:span><text:span text:style-name="T25"> Software Engineer<text:tab/> <text:s text:c="2"/></text:span><text:span text:style-name="T26">Squarespace</text:span><text:span text:style-name="T11"> <text:s/><text:tab/> <text:s text:c="50"/></text:span><text:span text:style-name="T25">201</text:span><text:span text:style-name="T28">9</text:span><text:span text:style-name="T25"> – </text:span><text:span text:style-name="T28">2021</text:span><text:span text:style-name="T25"> <text:s text:c="7"/></text:span></text:p>
      <text:list text:style-name="WWNum1">
        <text:list-item>
          <text:p text:style-name="P16">Helped develop a new Content Management System</text:p>
        </text:list-item>
        <text:list-item>
          <text:p text:style-name="P17" loext:marker-style-name="T14"><text:span text:style-name="T16">C</text:span><text:span text:style-name="T14">ontributed to several other backend services such as the social accounts integration, website analytics platform, search platform, etc.</text:span></text:p>
        </text:list-item>
      </text:list>
      <text:p text:style-name="P6" loext:marker-style-name="T2"/>
      <text:p text:style-name="P12" loext:marker-style-name="T25"><text:span text:style-name="T25">Software Engineer</text:span><text:span text:style-name="T27">ing Intern</text:span><text:span text:style-name="T25"><text:tab/> <text:s text:c="5"/></text:span><text:span text:style-name="T27">Facebook</text:span><text:span text:style-name="T11"> <text:s/><text:tab/> <text:s text:c="49"/></text:span><text:span text:style-name="T25">S</text:span><text:span text:style-name="T27">ummer 2018</text:span><text:span text:style-name="T25"> <text:s text:c="7"/></text:span></text:p>
      <text:list text:continue-numbering="true" text:style-name="WWNum1">
        <text:list-item>
          <text:p text:style-name="P18"><text:span text:style-name="T33">Develop</text:span><text:span text:style-name="T34">ed</text:span><text:span text:style-name="T33"> a </text:span><text:span text:style-name="T34">web application</text:span><text:span text:style-name="T33"> to automate the onboarding of other teams onto the message/notification delivery platform for Messenger</text:span></text:p>
        </text:list-item>
      </text:list>
      <text:p text:style-name="P2"><text:span text:style-name="T33"/></text:p>
      <text:p text:style-name="P13" loext:marker-style-name="T25"><text:span text:style-name="T27">Data</text:span><text:span text:style-name="T25"> Engineer</text:span><text:span text:style-name="T27">ing Intern</text:span><text:span text:style-name="T25"><text:tab/> <text:s text:c="5"/></text:span><text:span text:style-name="T27">Pinterest</text:span><text:span text:style-name="T11"> <text:s/><text:tab/> <text:s text:c="49"/></text:span><text:span text:style-name="T25">S</text:span><text:span text:style-name="T27">ummer 2017</text:span><text:span text:style-name="T25"> <text:s text:c="7"/></text:span></text:p>
      <text:list text:continue-numbering="true" text:style-name="WWNum1">
        <text:list-item>
          <text:p text:style-name="P19">Save<text:span text:style-name="T35">d</text:span> developers time by automating the data pipeline setup for new Kafka topics</text:p>
        </text:list-item>
      </text:list>
      <text:p text:style-name="P2"><text:span text:style-name="T33"/></text:p>
      <text:p text:style-name="P14" loext:marker-style-name="T25"><text:span text:style-name="T28">ML Research Assistant <text:s text:c="24"/>Rutgers University</text:span><text:span text:style-name="T11"> <text:s/><text:tab/> <text:s text:c="47"/></text:span><text:span text:style-name="T28">2017-2018</text:span></text:p>
      <text:list text:continue-numbering="true" text:style-name="WWNum1">
        <text:list-item>
          <text:p text:style-name="P20">Developed SVM classifiers for detecting road types based on the type of traffic they received</text:p>
        </text:list-item>
      </text:list>
      <text:p text:style-name="P6" loext:marker-style-name="T2"/>
      <text:p text:style-name="P14" loext:marker-style-name="T25"><text:span text:style-name="T28">Teaching Assistant <text:s text:c="31"/>Rutgers University</text:span><text:span text:style-name="T11"> <text:s/><text:tab/> <text:s text:c="47"/></text:span><text:span text:style-name="T28">2016-2017</text:span></text:p>
      <text:list text:continue-numbering="true" text:style-name="WWNum1">
        <text:list-item>
          <text:p text:style-name="P21">Lead five classes of 15 students each in Introduction to Computer Science. Conduct workshops, provide tutoring, and grade assignments</text:p>
        </text:list-item>
      </text:list>
      <text:p text:style-name="P11" loext:marker-style-name="T25"><text:span text:style-name="T25"/></text:p>
      <text:p text:style-name="P14" loext:marker-style-name="T25"><text:span text:style-name="T28">HackNY Fellow / SWE Intern <text:s text:c="14"/>HackNY / Skillshare</text:span><text:span text:style-name="T11"> <text:s/><text:tab/> <text:s text:c="38"/></text:span><text:span text:style-name="T29">Summer 2016</text:span></text:p>
      <text:list text:continue-numbering="true" text:style-name="WWNum1">
        <text:list-item>
          <text:p text:style-name="P22">Worked across the front-end and back-end to add new features to the site</text:p>
        </text:list-item>
      </text:list>
      <text:p text:style-name="P11" loext:marker-style-name="T25"/>
      <text:p text:style-name="P15" loext:marker-style-name="T25"><text:span text:style-name="T29">Tutor</text:span><text:span text:style-name="T25"><text:tab/> <text:s text:c="56"/></text:span><text:span text:style-name="T29">Rutgers University</text:span><text:span text:style-name="T11"> <text:s/><text:tab/> <text:s text:c="46"/></text:span><text:span text:style-name="T29">2015-2018</text:span></text:p>
      <text:list text:continue-numbering="true" text:style-name="WWNum1">
        <text:list-item>
          <text:p text:style-name="P22"><text:span text:style-name="T36">Tutor students and help them debug their software projects.</text:span></text:p>
        </text:list-item>
      </text:list>
      <text:h text:style-name="P1" text:outline-level="2"><text:bookmark text:name="_5jnocwoa0dvd"/>Skills</text:h>
      <text:p text:style-name="P23" loext:marker-style-name="T14"><text:span text:style-name="T24">Areas</text:span><text:span text:style-name="T14"> <text:s text:c="18"/></text:span><text:span text:style-name="T18">Full-Stack Web Development, Web APIs, CLIs, DevOps</text:span></text:p>
      <text:p text:style-name="Standard" loext:marker-style-name="T14"><text:span text:style-name="T21">Technologies</text:span><text:span text:style-name="T14"> <text:s text:c="4"/></text:span><text:span text:style-name="T16">Spring, Flask, React, Nix, MongoDB, </text:span><text:span text:style-name="T17">Elasticsearch</text:span></text:p>
      <text:p text:style-name="P24" loext:marker-style-name="T14"><text:span text:style-name="T23">Languages</text:span><text:span text:style-name="T17"> <text:s text:c="8"/></text:span><text:span text:style-name="T30">Python, JavaScript, Java, HTML, CSS, </text:span><text:span text:style-name="T31">Bash, </text:span><text:span text:style-name="T32">C, PHP, Hack</text:span></text:p>
      <text:p text:style-name="Standard" loext:marker-style-name="T14"><text:span text:style-name="T21">Other</text:span><text:span text:style-name="T14"><text:tab/><text:tab/> <text:s text:c="4"/></text:span><text:span text:style-name="T15">Mentorship, Conducting Interviews</text:span></text:p>
      <text:h text:style-name="P1" text:outline-level="2">Projects</text:h>
      <text:p text:style-name="P25" loext:marker-style-name="T8"><text:span text:style-name="T8">s</text:span><text:span text:style-name="T9">eenIt</text:span><text:span text:style-name="T8"> <text:s text:c="23"/></text:span><text:span text:style-name="T5">A web application for selecting </text:span><text:span text:style-name="T6">interesting</text:span><text:span text:style-name="T5"> detours during a road trip.</text:span></text:p>
      <text:p text:style-name="P25" loext:marker-style-name="T4"><text:span text:style-name="T9">Tabbo</text:span><text:span text:style-name="T8"> <text:s text:c="23"/></text:span><text:span text:style-name="T6">A browser extension for managing tabs.</text:span></text:p>
      <text:p text:style-name="P26" loext:marker-style-name="T4"><text:span text:style-name="T9">Shrednought</text:span><text:span text:style-name="T4"> <text:s text:c="10"/></text:span><text:span text:style-name="T6">A first-person action game that uses a real guitar as a controller, built with Unity.</text:span></text:p>
      <text:p text:style-name="P27" loext:marker-style-name="T4"><text:span text:style-name="T10">quick_command</text:span><text:span text:style-name="T6"> <text:s text:c="4"/>A </text:span><text:span text:style-name="T7">CLI for remembering shell commands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Times New Roman" fo:font-family="'Times New Roman'" style:font-family-generic="roman" style:font-pitch="variable" fo:font-size="12pt" fo:language="en" fo:country="N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0-06-10T15:41:00</meta:creation-date>
    <dc:date>2026-05-08T18:32:20.268000550</dc:date>
    <meta:editing-duration>PT2H28M6S</meta:editing-duration>
    <meta:generator>LibreOffice/24.2.7.2$Linux_X86_64 LibreOffice_project/420$Build-2</meta:generator>
    <meta:document-statistic meta:table-count="1" meta:image-count="0" meta:object-count="0" meta:page-count="1" meta:paragraph-count="32" meta:word-count="252" meta:character-count="2421" meta:non-whitespace-character-count="1510"/>
    <meta:user-defined meta:name="AppVersion">16.0000</meta:user-defined>
    <meta:template xlink:type="simple" xlink:actuate="onRequest" xlink:title="Normal.dotm" xlink:href=""/>
  </office:meta>
</office:document-meta>
</file>